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✦ 我已經對專案的資料清洗部分進行了升級，以解決阿拉伯語詞綴（Prefix/Suffix）和動詞變化（Conj</text:p>
      <text:p text:style-name="Standard"><text:s text:c="2"/>ugation）導致同一單字被重複計算的問題。</text:p>
      <text:p text:style-name="Standard"/>
      <text:p text:style-name="Standard"><text:s text:c="2"/>主要修改內容：</text:p>
      <text:p text:style-name="Standard"><text:s text:c="3"/>1. 導入 qalsadi 詞形還原器 (Lemmatizer)：</text:p>
      <text:p text:style-name="Standard"><text:s text:c="7"/>* 我測試了 NLTK (ISRIStemmer)、Tashaphyne 和 Qalsadi 等工具，發現 Qalsadi</text:p>
      <text:p text:style-name="Standard"><text:s text:c="9"/>在處理阿拉伯語詞形還原時表現最出色（例如：它能將 والكتاب、كتابي、الكتاب</text:p>
      <text:p text:style-name="Standard"><text:s text:c="9"/>都精準還原成基準名詞 كتاب，將 يكتبون 還原為基準動詞 كتب）。</text:p>
      <text:p text:style-name="Standard"><text:s text:c="7"/>* 我已經修改了 frequency_analyzer.py 的核心迴圈。現在每一行文字被斷詞後，會先送入</text:p>
      <text:p text:style-name="Standard"><text:s text:c="9"/>qalsadi 提取出「詞幹 (Lemma)」，然後才進行計數。</text:p>
      <text:p text:style-name="Standard"><text:s text:c="3"/>2. 更新 readme.md：</text:p>
      <text:p text:style-name="Standard"><text:s text:c="7"/>* 在依賴函式庫和 pip install 指令中加入了 qalsadi。</text:p>
      <text:p text:style-name="Standard"/>
      <text:p text:style-name="Standard"><text:s text:c="2"/>接下來的影響</text:p>
      <text:p text:style-name="Standard"><text:s text:c="2"/>有了這個改動後，當您下次重新執行 frequency_analyzer.py 處理維基百科文本時，生成的</text:p>
      <text:p text:style-name="Standard"><text:s text:c="2"/>voc_database.csv</text:p>
      <text:p text:style-name="Standard"><text:s text:c="2"/>將會變得乾淨且集中很多。高頻字將會是真正的「基礎單字（Lemmas）」，而不再被各種冠詞（如</text:p>
      <text:p text:style-name="Standard"><text:s text:c="2"/>ال）或代名詞後綴（如 ـي）稀釋掉權重。</text:p>
      <text:p text:style-name="Standard"/>
      <text:p text:style-name="Standard"><text:s text:c="2"/>您可以嘗試重新建立 voc_database.csv，或者我們能繼續針對計畫書中其他落後的部分（例如：強化</text:p>
      <text:p text:style-name="Standard"><text:s text:c="2"/>SRS 權重演算法、或是部署 GUI）進行開發。想先往哪個方向推進呢？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01:13:38.023224351</meta:creation-date>
    <dc:date>2026-05-15T01:14:25.753890161</dc:date>
    <meta:editing-duration>PT48S</meta:editing-duration>
    <meta:editing-cycles>1</meta:editing-cycles>
    <meta:document-statistic meta:table-count="0" meta:image-count="0" meta:object-count="0" meta:page-count="1" meta:paragraph-count="18" meta:word-count="378" meta:character-count="701" meta:non-whitespace-character-count="594"/>
    <meta:generator>LibreOffice/24.2.7.2$Linux_X86_64 LibreOffice_project/420$Build-2</meta:generator>
  </office:meta>
</office:document-meta>
</file>